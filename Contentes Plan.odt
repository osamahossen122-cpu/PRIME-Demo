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list-style-name="LFO1" style:family="paragraph"/>
    <style:style style:name="P15" style:parent-style-name="Normal" style:list-style-name="LFO1" style:family="paragraph"/>
    <style:style style:name="P16" style:parent-style-name="Normal" style:list-style-name="LFO1" style:family="paragraph"/>
    <style:style style:name="P17" style:parent-style-name="Normal" style:list-style-name="LFO1" style:family="paragraph"/>
    <style:style style:name="P18" style:parent-style-name="Normal" style:list-style-name="LFO1" style:family="paragraph"/>
    <style:style style:name="P19" style:parent-style-name="Normal" style:list-style-name="LFO1" style:family="paragraph"/>
    <style:style style:name="P20" style:parent-style-name="Normal" style:list-style-name="LFO1" style:family="paragraph"/>
    <style:style style:name="P21" style:parent-style-name="Normal" style:list-style-name="LFO1" style:family="paragraph"/>
    <style:style style:name="P22" style:parent-style-name="Normal" style:list-style-name="LFO1" style:family="paragraph"/>
    <style:style style:name="P23" style:parent-style-name="Normal" style:family="paragraph">
      <style:text-properties fo:font-weight="bold" style:font-weight-asian="bold" style:font-weight-complex="bold"/>
    </style:style>
    <style:style style:name="P24" style:parent-style-name="Normal" style:list-style-name="LFO2" style:family="paragraph"/>
    <style:style style:name="P25" style:parent-style-name="Normal" style:list-style-name="LFO2" style:family="paragraph"/>
    <style:style style:name="P26" style:parent-style-name="Normal" style:list-style-name="LFO2" style:family="paragraph"/>
    <style:style style:name="P27" style:parent-style-name="Normal" style:list-style-name="LFO2" style:family="paragraph"/>
    <style:style style:name="P28" style:parent-style-name="Normal" style:list-style-name="LFO2" style:family="paragraph"/>
    <style:style style:name="P29" style:parent-style-name="Normal" style:list-style-name="LFO3" style:family="paragraph"/>
    <style:style style:name="P30" style:parent-style-name="Normal" style:list-style-name="LFO3" style:family="paragraph"/>
    <style:style style:name="P31" style:parent-style-name="Normal" style:list-style-name="LFO3" style:family="paragraph"/>
    <style:style style:name="P32" style:parent-style-name="Normal" style:list-style-name="LFO3" style:family="paragraph"/>
    <style:style style:name="P33" style:parent-style-name="Normal" style:list-style-name="LFO3" style:family="paragraph"/>
    <style:style style:name="P34" style:parent-style-name="Normal" style:list-style-name="LFO3" style:family="paragraph"/>
    <style:style style:name="P35" style:parent-style-name="Normal" style:list-style-name="LFO3" style:family="paragraph"/>
    <style:style style:name="P36" style:parent-style-name="Normal" style:list-style-name="LFO3" style:family="paragraph"/>
    <style:style style:name="P37" style:parent-style-name="Normal" style:list-style-name="LFO3" style:family="paragraph"/>
    <style:style style:name="P38" style:parent-style-name="Normal" style:list-style-name="LFO3" style:family="paragraph"/>
    <style:style style:name="P39" style:parent-style-name="Normal" style:list-style-name="LFO3" style:family="paragraph"/>
    <style:style style:name="P40" style:parent-style-name="Normal" style:list-style-name="LFO3" style:family="paragraph"/>
    <style:style style:name="P41" style:parent-style-name="Normal" style:list-style-name="LFO3" style:family="paragraph"/>
    <style:style style:name="P42" style:parent-style-name="Normal" style:list-style-name="LFO3" style:family="paragraph"/>
    <style:style style:name="P43" style:parent-style-name="Normal" style:list-style-name="LFO3" style:family="paragraph"/>
    <style:style style:name="P44" style:parent-style-name="Normal" style:list-style-name="LFO3" style:family="paragraph"/>
    <style:style style:name="P45" style:parent-style-name="Normal" style:list-style-name="LFO3" style:family="paragraph"/>
    <style:style style:name="P46" style:parent-style-name="Normal" style:list-style-name="LFO4" style:family="paragraph"/>
    <style:style style:name="P47" style:parent-style-name="Normal" style:list-style-name="LFO4" style:family="paragraph"/>
    <style:style style:name="P48" style:parent-style-name="Normal" style:list-style-name="LFO4" style:family="paragraph"/>
    <style:style style:name="P49" style:parent-style-name="Normal" style:list-style-name="LFO4" style:family="paragraph"/>
    <style:style style:name="P50" style:parent-style-name="Normal" style:list-style-name="LFO4" style:family="paragraph"/>
    <style:style style:name="P51" style:parent-style-name="Normal" style:list-style-name="LFO4" style:family="paragraph"/>
    <style:style style:name="P52" style:parent-style-name="Normal" style:list-style-name="LFO4" style:family="paragraph"/>
    <style:style style:name="P53" style:parent-style-name="Normal" style:family="paragraph">
      <style:text-properties fo:font-weight="bold" style:font-weight-asian="bold" style:font-weight-complex="bold"/>
    </style:style>
    <style:style style:name="P54" style:parent-style-name="Normal" style:list-style-name="LFO5" style:family="paragraph"/>
    <style:style style:name="P55" style:parent-style-name="Normal" style:list-style-name="LFO5" style:family="paragraph"/>
    <style:style style:name="P56" style:parent-style-name="Normal" style:list-style-name="LFO5" style:family="paragraph"/>
    <style:style style:name="P57" style:parent-style-name="Normal" style:list-style-name="LFO5" style:family="paragraph"/>
    <style:style style:name="P58" style:parent-style-name="Normal" style:list-style-name="LFO5" style:family="paragraph"/>
    <style:style style:name="P59" style:parent-style-name="Normal" style:list-style-name="LFO6" style:family="paragraph"/>
    <style:style style:name="P60" style:parent-style-name="Normal" style:list-style-name="LFO6" style:family="paragraph"/>
    <style:style style:name="P61" style:parent-style-name="Normal" style:list-style-name="LFO6" style:family="paragraph"/>
    <style:style style:name="P62" style:parent-style-name="Normal" style:list-style-name="LFO6" style:family="paragraph"/>
    <style:style style:name="P63" style:parent-style-name="Normal" style:list-style-name="LFO6" style:family="paragraph"/>
    <style:style style:name="P64" style:parent-style-name="Normal" style:list-style-name="LFO6" style:family="paragraph"/>
    <style:style style:name="P65" style:parent-style-name="Normal" style:list-style-name="LFO6" style:family="paragraph"/>
    <style:style style:name="P66" style:parent-style-name="Normal" style:list-style-name="LFO6" style:family="paragraph"/>
    <style:style style:name="P67" style:parent-style-name="Normal" style:list-style-name="LFO6" style:family="paragraph"/>
    <style:style style:name="P68" style:parent-style-name="Normal" style:list-style-name="LFO6" style:family="paragraph"/>
    <style:style style:name="P69" style:parent-style-name="Normal" style:family="paragraph">
      <style:text-properties fo:font-weight="bold" style:font-weight-asian="bold" style:font-weight-complex="bold"/>
    </style:style>
    <style:style style:name="P70" style:parent-style-name="Normal" style:list-style-name="LFO7" style:family="paragraph"/>
    <style:style style:name="P71" style:parent-style-name="Normal" style:list-style-name="LFO7" style:family="paragraph"/>
    <style:style style:name="P72" style:parent-style-name="Normal" style:list-style-name="LFO7" style:family="paragraph"/>
    <style:style style:name="P73" style:parent-style-name="Normal" style:list-style-name="LFO7" style:family="paragraph"/>
    <style:style style:name="P74" style:parent-style-name="Normal" style:list-style-name="LFO7" style:family="paragraph"/>
    <style:style style:name="P75" style:parent-style-name="Normal" style:list-style-name="LFO7" style:family="paragraph"/>
    <style:style style:name="P76" style:parent-style-name="Normal" style:list-style-name="LFO7" style:family="paragraph"/>
    <style:style style:name="P77" style:parent-style-name="Normal" style:list-style-name="LFO7" style:family="paragraph"/>
    <style:style style:name="P78" style:parent-style-name="Normal" style:list-style-name="LFO7" style:family="paragraph"/>
    <style:style style:name="P79" style:parent-style-name="Normal" style:list-style-name="LFO7" style:family="paragraph"/>
    <style:style style:name="P80" style:parent-style-name="Normal" style:family="paragraph">
      <style:text-properties fo:font-weight="bold" style:font-weight-asian="bold" style:font-weight-complex="bold"/>
    </style:style>
    <style:style style:name="P81" style:parent-style-name="Normal" style:list-style-name="LFO8" style:family="paragraph"/>
    <style:style style:name="P82" style:parent-style-name="Normal" style:list-style-name="LFO8" style:family="paragraph"/>
    <style:style style:name="P83" style:parent-style-name="Normal" style:list-style-name="LFO8" style:family="paragraph"/>
    <style:style style:name="P84" style:parent-style-name="Normal" style:list-style-name="LFO8" style:family="paragraph"/>
    <style:style style:name="P85" style:parent-style-name="Normal" style:list-style-name="LFO8" style:family="paragraph"/>
    <style:style style:name="P86" style:parent-style-name="Normal" style:list-style-name="LFO8" style:family="paragraph"/>
    <style:style style:name="P87" style:parent-style-name="Normal" style:list-style-name="LFO8" style:family="paragraph"/>
    <style:style style:name="P88" style:parent-style-name="Normal" style:list-style-name="LFO8" style:family="paragraph"/>
    <style:style style:name="P89" style:parent-style-name="Normal" style:family="paragraph">
      <style:text-properties fo:font-weight="bold" style:font-weight-asian="bold" style:font-weight-complex="bold"/>
    </style:style>
    <style:style style:name="P90" style:parent-style-name="Normal" style:list-style-name="LFO9" style:family="paragraph"/>
    <style:style style:name="T91" style:parent-style-name="DefaultParagraphFont" style:family="text">
      <style:text-properties fo:font-weight="bold" style:font-weight-asian="bold" style:font-weight-complex="bold"/>
    </style:style>
    <style:style style:name="P92" style:parent-style-name="Normal" style:list-style-name="LFO9" style:family="paragraph"/>
    <style:style style:name="T93" style:parent-style-name="DefaultParagraphFont" style:family="text">
      <style:text-properties fo:font-weight="bold" style:font-weight-asian="bold" style:font-weight-complex="bold"/>
    </style:style>
    <style:style style:name="P94" style:parent-style-name="Normal" style:list-style-name="LFO9" style:family="paragraph"/>
    <style:style style:name="T95" style:parent-style-name="DefaultParagraphFont" style:family="text">
      <style:text-properties fo:font-weight="bold" style:font-weight-asian="bold" style:font-weight-complex="bold"/>
    </style:style>
    <style:style style:name="P96" style:parent-style-name="Normal" style:list-style-name="LFO9" style:family="paragraph"/>
    <style:style style:name="T97" style:parent-style-name="DefaultParagraphFont" style:family="text">
      <style:text-properties fo:font-weight="bold" style:font-weight-asian="bold" style:font-weight-complex="bold"/>
    </style:style>
    <style:style style:name="P98" style:parent-style-name="Normal" style:list-style-name="LFO9" style:family="paragraph"/>
    <style:style style:name="T99" style:parent-style-name="DefaultParagraphFont" style:family="text">
      <style:text-properties fo:font-weight="bold" style:font-weight-asian="bold" style:font-weight-complex="bold"/>
    </style:style>
    <style:style style:name="P100" style:parent-style-name="Normal" style:list-style-name="LFO9" style:family="paragraph"/>
    <style:style style:name="T101" style:parent-style-name="DefaultParagraphFont" style:family="text">
      <style:text-properties fo:font-weight="bold" style:font-weight-asian="bold" style:font-weight-complex="bold"/>
    </style:style>
    <style:style style:name="P102" style:parent-style-name="Normal" style:list-style-name="LFO9" style:family="paragraph"/>
    <style:style style:name="T103" style:parent-style-name="DefaultParagraphFont" style:family="text">
      <style:text-properties fo:font-weight="bold" style:font-weight-asian="bold" style:font-weight-complex="bold"/>
    </style:style>
    <style:style style:name="P104" style:parent-style-name="Normal" style:list-style-name="LFO9" style:family="paragraph"/>
    <style:style style:name="T105" style:parent-style-name="DefaultParagraphFont" style:family="text">
      <style:text-properties fo:font-weight="bold" style:font-weight-asian="bold" style:font-weight-complex="bold"/>
    </style:style>
    <style:style style:name="P106" style:parent-style-name="Normal" style:list-style-name="LFO9" style:family="paragraph"/>
    <style:style style:name="T107" style:parent-style-name="DefaultParagraphFont" style:family="text">
      <style:text-properties fo:font-weight="bold" style:font-weight-asian="bold" style:font-weight-complex="bold"/>
    </style:style>
    <style:style style:name="P108" style:parent-style-name="Normal" style:list-style-name="LFO9" style:family="paragraph"/>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Contentes Plan<text:s/></text:p>
      <text:p text:style-name="Normal"/>
      <text:p text:style-name="Normal">Yes. Based on your website structure, I would recommend<text:s/><text:span text:style-name="T2">rewriting the entire website from scratch</text:span><text:s/>instead of editing the current copy.</text:p>
      <text:p text:style-name="Normal">Looking at your knowledge base (especially the sections about<text:s/><text:span text:style-name="T3">Copy is King</text:span>,<text:s/><text:span text:style-name="T4">Problem → Agitate → Solve (PAS)</text:span>,<text:s/><text:span text:style-name="T5">clear CTA</text:span>,<text:s/><text:span text:style-name="T6">business-focused messaging</text:span>,<text:s/><text:span text:style-name="T7">measurable results</text:span>, and<text:s/><text:span text:style-name="T8">avoiding generic claims</text:span>), I would write the site to maximize conversions rather than simply describe services.</text:p>
      <text:p text:style-name="P9">What I would write</text:p>
      <text:p text:style-name="Normal">Instead of generic content like:</text:p>
      <text:p text:style-name="Normal">We provide professional renovation services...</text:p>
      <text:p text:style-name="Normal">I would write copy like:</text:p>
      <text:p text:style-name="Normal"><text:span text:style-name="T10">Renovation &amp; Security Services Done Right.</text:span></text:p>
      <text:p text:style-name="Normal">Whether you're renovating a property or protecting it, delays, poor workmanship, and unreliable contractors cost time and money. We deliver professional renovation and security solutions with clear communication, dependable teams, and quality work from start to finish.</text:p>
      <text:p text:style-name="Normal"><text:span text:style-name="T11">Book a free consultation today.</text:span></text:p>
      <text:p text:style-name="Normal"><draw:custom-shape svg:x="0in" svg:y="0in" svg:width="45.51042in" svg:height="0.00139in" draw:z-index="0" draw:id="id0" draw:style-name="a0" draw:name="Horizontal Line 37" text:anchor-type="as-char"><svg:title/><svg:desc/><draw:enhanced-geometry draw:type="non-primitive" svg:viewBox="0 0 21600 21600" draw:enhanced-path="M 0 0 L 21600 0 21600 21600 0 21600 Z N"/></draw:custom-shape></text:p>
      <text:p text:style-name="P12">Complete Content Plan</text:p>
      <text:p text:style-name="P13">Home</text:p>
      <text:list text:style-name="LFO1" text:continue-numbering="true">
        <text:list-item>
          <text:p text:style-name="P14">Hero Section</text:p>
        </text:list-item>
        <text:list-item>
          <text:p text:style-name="P15">Trust Section</text:p>
        </text:list-item>
        <text:list-item>
          <text:p text:style-name="P16">Renovation Services Overview</text:p>
        </text:list-item>
        <text:list-item>
          <text:p text:style-name="P17">Security Services Overview</text:p>
        </text:list-item>
        <text:list-item>
          <text:p text:style-name="P18">Why Choose Us</text:p>
        </text:list-item>
        <text:list-item>
          <text:p text:style-name="P19">Process</text:p>
        </text:list-item>
        <text:list-item>
          <text:p text:style-name="P20">Testimonials</text:p>
        </text:list-item>
        <text:list-item>
          <text:p text:style-name="P21">FAQ</text:p>
        </text:list-item>
        <text:list-item>
          <text:p text:style-name="P22">CTA</text:p>
        </text:list-item>
      </text:list>
      <text:p text:style-name="Normal"><draw:custom-shape svg:x="0in" svg:y="0in" svg:width="43.55972in" svg:height="0.00139in" draw:z-index="0" draw:id="id1" draw:style-name="a1" draw:name="Horizontal Line 38" text:anchor-type="as-char"><svg:title/><svg:desc/><draw:enhanced-geometry draw:type="non-primitive" svg:viewBox="0 0 21600 21600" draw:enhanced-path="M 0 0 L 21600 0 21600 21600 0 21600 Z N"/></draw:custom-shape></text:p>
      <text:p text:style-name="P23">Renovation</text:p>
      <text:list text:style-name="LFO2" text:continue-numbering="true">
        <text:list-item>
          <text:p text:style-name="P24">Landing Page</text:p>
        </text:list-item>
        <text:list-item>
          <text:p text:style-name="P25">Services Page</text:p>
        </text:list-item>
        <text:list-item>
          <text:p text:style-name="P26">About</text:p>
        </text:list-item>
        <text:list-item>
          <text:p text:style-name="P27">Contact</text:p>
        </text:list-item>
        <text:list-item>
          <text:p text:style-name="P28">Booking Page</text:p>
        </text:list-item>
      </text:list>
      <text:p text:style-name="Normal">Then individual pages:</text:p>
      <text:list text:style-name="LFO3" text:continue-numbering="true">
        <text:list-item>
          <text:p text:style-name="P29">Flooring</text:p>
        </text:list-item>
        <text:list-item>
          <text:p text:style-name="P30">Parquet</text:p>
        </text:list-item>
        <text:list-item>
          <text:p text:style-name="P31">Vinyl</text:p>
        </text:list-item>
        <text:list-item>
          <text:p text:style-name="P32">Floor Installation</text:p>
        </text:list-item>
        <text:list-item>
          <text:p text:style-name="P33">Gypsum</text:p>
        </text:list-item>
        <text:list-item>
          <text:p text:style-name="P34">Wallpaper</text:p>
        </text:list-item>
        <text:list-item>
          <text:p text:style-name="P35">Painting</text:p>
        </text:list-item>
        <text:list-item>
          <text:p text:style-name="P36">Decorative Finishes</text:p>
        </text:list-item>
        <text:list-item>
          <text:p text:style-name="P37">Wood Panels</text:p>
        </text:list-item>
        <text:list-item>
          <text:p text:style-name="P38">Apartment Renovation</text:p>
        </text:list-item>
        <text:list-item>
          <text:p text:style-name="P39">House Renovation</text:p>
        </text:list-item>
        <text:list-item>
          <text:p text:style-name="P40">Electrical Maintenance</text:p>
        </text:list-item>
        <text:list-item>
          <text:p text:style-name="P41">General Maintenance</text:p>
        </text:list-item>
        <text:list-item>
          <text:p text:style-name="P42">Demolition</text:p>
        </text:list-item>
        <text:list-item>
          <text:p text:style-name="P43">Debris Removal</text:p>
        </text:list-item>
        <text:list-item>
          <text:p text:style-name="P44">Site Cleaning</text:p>
        </text:list-item>
        <text:list-item>
          <text:p text:style-name="P45">Door Installation</text:p>
        </text:list-item>
      </text:list>
      <text:p text:style-name="Normal">Each page would include:</text:p>
      <text:list text:style-name="LFO4" text:continue-numbering="true">
        <text:list-item>
          <text:p text:style-name="P46">Strong headline</text:p>
        </text:list-item>
        <text:list-item>
          <text:p text:style-name="P47">Problem</text:p>
        </text:list-item>
        <text:list-item>
          <text:p text:style-name="P48">Why it matters</text:p>
        </text:list-item>
        <text:list-item>
          <text:p text:style-name="P49">Our solution</text:p>
        </text:list-item>
        <text:list-item>
          <text:p text:style-name="P50">Benefits</text:p>
        </text:list-item>
        <text:list-item>
          <text:p text:style-name="P51">Process</text:p>
        </text:list-item>
        <text:list-item>
          <text:p text:style-name="P52">CTA</text:p>
        </text:list-item>
      </text:list>
      <text:p text:style-name="Normal"><draw:custom-shape svg:x="0in" svg:y="0in" svg:width="43.55972in" svg:height="0.00139in" draw:z-index="0" draw:id="id2" draw:style-name="a2" draw:name="Horizontal Line 39" text:anchor-type="as-char"><svg:title/><svg:desc/><draw:enhanced-geometry draw:type="non-primitive" svg:viewBox="0 0 21600 21600" draw:enhanced-path="M 0 0 L 21600 0 21600 21600 0 21600 Z N"/></draw:custom-shape></text:p>
      <text:p text:style-name="P53">Security</text:p>
      <text:list text:style-name="LFO5" text:continue-numbering="true">
        <text:list-item>
          <text:p text:style-name="P54">Landing Page</text:p>
        </text:list-item>
        <text:list-item>
          <text:p text:style-name="P55">Services</text:p>
        </text:list-item>
        <text:list-item>
          <text:p text:style-name="P56">About</text:p>
        </text:list-item>
        <text:list-item>
          <text:p text:style-name="P57">Contact</text:p>
        </text:list-item>
        <text:list-item>
          <text:p text:style-name="P58">Booking</text:p>
        </text:list-item>
      </text:list>
      <text:p text:style-name="Normal">Then:</text:p>
      <text:list text:style-name="LFO6" text:continue-numbering="true">
        <text:list-item>
          <text:p text:style-name="P59">Static Guards</text:p>
        </text:list-item>
        <text:list-item>
          <text:p text:style-name="P60">Construction Site Security</text:p>
        </text:list-item>
        <text:list-item>
          <text:p text:style-name="P61">Event Security</text:p>
        </text:list-item>
        <text:list-item>
          <text:p text:style-name="P62">Property Protection</text:p>
        </text:list-item>
        <text:list-item>
          <text:p text:style-name="P63">CCTV Installation</text:p>
        </text:list-item>
        <text:list-item>
          <text:p text:style-name="P64">Security Camera Systems</text:p>
        </text:list-item>
        <text:list-item>
          <text:p text:style-name="P65">Video Surveillance</text:p>
        </text:list-item>
        <text:list-item>
          <text:p text:style-name="P66">Monitoring Solutions</text:p>
        </text:list-item>
        <text:list-item>
          <text:p text:style-name="P67">Facility Surveillance</text:p>
        </text:list-item>
        <text:list-item>
          <text:p text:style-name="P68">Security Operations</text:p>
        </text:list-item>
      </text:list>
      <text:p text:style-name="Normal">Every page follows the same structure.</text:p>
      <text:p text:style-name="Normal"><draw:custom-shape svg:x="0in" svg:y="0in" svg:width="45.51042in" svg:height="0.00139in" draw:z-index="0" draw:id="id3" draw:style-name="a3" draw:name="Horizontal Line 40" text:anchor-type="as-char"><svg:title/><svg:desc/><draw:enhanced-geometry draw:type="non-primitive" svg:viewBox="0 0 21600 21600" draw:enhanced-path="M 0 0 L 21600 0 21600 21600 0 21600 Z N"/></draw:custom-shape></text:p>
      <text:p text:style-name="P69">SEO Structure</text:p>
      <text:p text:style-name="Normal">Each service page would include:</text:p>
      <text:list text:style-name="LFO7" text:continue-numbering="true">
        <text:list-item>
          <text:p text:style-name="P70">SEO Title</text:p>
        </text:list-item>
        <text:list-item>
          <text:p text:style-name="P71">Meta Description</text:p>
        </text:list-item>
        <text:list-item>
          <text:p text:style-name="P72">H1</text:p>
        </text:list-item>
        <text:list-item>
          <text:p text:style-name="P73">Intro</text:p>
        </text:list-item>
        <text:list-item>
          <text:p text:style-name="P74">Problem</text:p>
        </text:list-item>
        <text:list-item>
          <text:p text:style-name="P75">Solution</text:p>
        </text:list-item>
        <text:list-item>
          <text:p text:style-name="P76">Benefits</text:p>
        </text:list-item>
        <text:list-item>
          <text:p text:style-name="P77">Process</text:p>
        </text:list-item>
        <text:list-item>
          <text:p text:style-name="P78">FAQ</text:p>
        </text:list-item>
        <text:list-item>
          <text:p text:style-name="P79">CTA</text:p>
        </text:list-item>
      </text:list>
      <text:p text:style-name="Normal"><draw:custom-shape svg:x="0in" svg:y="0in" svg:width="43.55972in" svg:height="0.00139in" draw:z-index="0" draw:id="id4" draw:style-name="a4" draw:name="Horizontal Line 41" text:anchor-type="as-char"><svg:title/><svg:desc/><draw:enhanced-geometry draw:type="non-primitive" svg:viewBox="0 0 21600 21600" draw:enhanced-path="M 0 0 L 21600 0 21600 21600 0 21600 Z N"/></draw:custom-shape></text:p>
      <text:p text:style-name="P80">Tone</text:p>
      <text:p text:style-name="Normal">Exactly like your knowledge base recommends:</text:p>
      <text:list text:style-name="LFO8" text:continue-numbering="true">
        <text:list-item>
          <text:p text:style-name="P81">Business-focused</text:p>
        </text:list-item>
        <text:list-item>
          <text:p text:style-name="P82">Clear</text:p>
        </text:list-item>
        <text:list-item>
          <text:p text:style-name="P83">Direct</text:p>
        </text:list-item>
        <text:list-item>
          <text:p text:style-name="P84">Simple</text:p>
        </text:list-item>
        <text:list-item>
          <text:p text:style-name="P85">Human</text:p>
        </text:list-item>
        <text:list-item>
          <text:p text:style-name="P86">No fluff</text:p>
        </text:list-item>
        <text:list-item>
          <text:p text:style-name="P87">No marketing buzzwords</text:p>
        </text:list-item>
        <text:list-item>
          <text:p text:style-name="P88">Focus on results instead of features</text:p>
        </text:list-item>
      </text:list>
      <text:p text:style-name="Normal"><draw:custom-shape svg:x="0in" svg:y="0in" svg:width="43.55972in" svg:height="0.00139in" draw:z-index="0" draw:id="id5" draw:style-name="a5" draw:name="Horizontal Line 42" text:anchor-type="as-char"><svg:title/><svg:desc/><draw:enhanced-geometry draw:type="non-primitive" svg:viewBox="0 0 21600 21600" draw:enhanced-path="M 0 0 L 21600 0 21600 21600 0 21600 Z N"/></draw:custom-shape></text:p>
      <text:p text:style-name="P89">Total Deliverables</text:p>
      <text:p text:style-name="Normal">I would produce approximately:</text:p>
      <text:list text:style-name="LFO9" text:continue-numbering="true">
        <text:list-item>
          <text:p text:style-name="P90"><text:span text:style-name="T91">1 Home page</text:span></text:p>
        </text:list-item>
        <text:list-item>
          <text:p text:style-name="P92"><text:span text:style-name="T93">2 Landing pages</text:span><text:s/>(Renovation &amp; Security)</text:p>
        </text:list-item>
        <text:list-item>
          <text:p text:style-name="P94"><text:span text:style-name="T95">2 About pages</text:span></text:p>
        </text:list-item>
        <text:list-item>
          <text:p text:style-name="P96"><text:span text:style-name="T97">2 Contact pages</text:span></text:p>
        </text:list-item>
        <text:list-item>
          <text:p text:style-name="P98"><text:span text:style-name="T99">2 Booking pages</text:span></text:p>
        </text:list-item>
        <text:list-item>
          <text:p text:style-name="P100"><text:span text:style-name="T101">2 Services overview pages</text:span></text:p>
        </text:list-item>
        <text:list-item>
          <text:p text:style-name="P102"><text:span text:style-name="T103">20+ individual service pages</text:span></text:p>
        </text:list-item>
        <text:list-item>
          <text:p text:style-name="P104"><text:span text:style-name="T105">SEO titles &amp; meta descriptions</text:span></text:p>
        </text:list-item>
        <text:list-item>
          <text:p text:style-name="P106"><text:span text:style-name="T107">FAQs for every service</text:span></text:p>
        </text:list-item>
        <text:list-item>
          <text:p text:style-name="P108"><text:span text:style-name="T109">Calls-to-action for every page</text:span></text:p>
        </text:list-item>
      </text:list>
      <text:p text:style-name="Normal">This would be<text:s/><text:span text:style-name="T110">70,000–100,000+ words</text:span><text:s/>of conversion-focused website copy written to rank well in search engines and convert visitors into enquiries, following the principles from your knowledge base rather than generic marketing copy.</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Osama Hussein</meta:initial-creator>
    <dc:creator>Osama Hussein</dc:creator>
    <meta:creation-date>2026-07-03T19:02:00Z</meta:creation-date>
    <dc:date>2026-07-03T19:03:00Z</dc:date>
    <meta:template xlink:href="Normal.dotm" xlink:type="simple"/>
    <meta:editing-cycles>1</meta:editing-cycles>
    <meta:editing-duration>PT0S</meta:editing-duration>
    <meta:document-statistic meta:page-count="5" meta:paragraph-count="5" meta:word-count="388" meta:character-count="2596" meta:row-count="18" meta:non-whitespace-character-count="2213"/>
  </office:meta>
</office:document-meta>
</file>